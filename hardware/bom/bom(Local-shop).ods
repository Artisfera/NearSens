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47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3.895cm"/>
    </style:style>
    <style:style style:name="co5" style:family="table-column">
      <style:table-column-properties fo:break-before="auto" style:column-width="20.7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1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Cena jednostkowa (Brutto)</text:p>
          </table:table-cell>
          <table:table-cell office:value-type="string" calcext:value-type="string">
            <text:p>Ilość</text:p>
          </table:table-cell>
          <table:table-cell office:value-type="string" calcext:value-type="string">
            <text:p>Cena końcowa (Brutto)</text:p>
          </table:table-cell>
          <table:table-cell office:value-type="string" calcext:value-type="string">
            <text:p>Odnoś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INY1626-SU</text:p>
          </table:table-cell>
          <table:table-cell office:value-type="float" office:value="5.9286" calcext:value-type="float">
            <text:p>5,9286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5.9286" calcext:value-type="float">
            <text:p>5,9286</text:p>
          </table:table-cell>
          <table:table-cell office:value-type="string" calcext:value-type="string">
            <text:p>https://www.tme.eu/pl/details/attiny1626-su/rodzina-avr-8-bit/microchip-technology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57A-DIO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0.16" calcext:value-type="float">
            <text:p>0,16</text:p>
          </table:table-cell>
          <table:table-cell office:value-type="string" calcext:value-type="string">
            <text:p><text:a xlink:href="https://www.tme.eu/pl/details/bc857a-dio/tranzystory-pnp-smd/diotec-semiconductor/bc857a/" xlink:type="simple">https://www.tme.eu/pl/details/bc857a-dio/tranzystory-pnp-smd/diotec-semiconductor/bc857a/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M324DT</text:p>
          </table:table-cell>
          <table:table-cell office:value-type="float" office:value="1.059" calcext:value-type="float">
            <text:p>1,059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1.059" calcext:value-type="float">
            <text:p>1,059</text:p>
          </table:table-cell>
          <table:table-cell office:value-type="string" calcext:value-type="string">
            <text:p>https://www.tme.eu/pl/details/lm324dt/wzmacniacze-operacyjne-smd/stmicroelectronics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C-SR04</text:p>
          </table:table-cell>
          <table:table-cell office:value-type="float" office:value="5.29" calcext:value-type="float">
            <text:p>5,29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5.29" calcext:value-type="float">
            <text:p>5,29</text:p>
          </table:table-cell>
          <table:table-cell office:value-type="string" calcext:value-type="string">
            <text:p>http://kamami.pl/czujniki-odleglosci/197762-modul-hc-sr04-ultradzwiekowy-czujnik-odleglosci-do-5-metrow-5906623440283.htm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14543BDG</text:p>
          </table:table-cell>
          <table:table-cell office:value-type="float" office:value="2.42" calcext:value-type="float">
            <text:p>2,42</text:p>
          </table:table-cell>
          <table:table-cell office:value-type="float" office:value="3" calcext:value-type="float">
            <text:p>3</text:p>
          </table:table-cell>
          <table:table-cell table:formula="of:=[.C6]*[.D6]" office:value-type="float" office:value="7.26" calcext:value-type="float">
            <text:p>7,26</text:p>
          </table:table-cell>
          <table:table-cell office:value-type="string" calcext:value-type="string">
            <text:p><text:a xlink:href="https://www.tme.eu/pl/details/mc14543bdg/dekodery-multipleksery-przelaczniki/onsemi/" xlink:type="simple">https://www.tme.eu/pl/details/mc14543bdg/dekodery-multipleksery-przelaczniki/onsemi/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 117-TS-20/7,5/V</text:p>
          </table:table-cell>
          <table:table-cell office:value-type="float" office:value="6.63" calcext:value-type="float">
            <text:p>6,63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6.63" calcext:value-type="float">
            <text:p>6,63</text:p>
          </table:table-cell>
          <table:table-cell office:value-type="string" calcext:value-type="string">
            <text:p><text:a xlink:href="https://www.tme.eu/pl/details/de117-ts-20_7.5" xlink:type="simple">https://www.tme.eu/pl/details/de117-ts-20_7.5</text:a>/wyswietlacze-lcd-cyfrowe/display-elektronik/de-117-ts-20-7-5-v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CT switch</text:p>
          </table:table-cell>
          <table:table-cell office:value-type="float" office:value="0.29" calcext:value-type="float">
            <text:p>0,29</text:p>
          </table:table-cell>
          <table:table-cell office:value-type="float" office:value="5" calcext:value-type="float">
            <text:p>5</text:p>
          </table:table-cell>
          <table:table-cell table:formula="of:=[.C8]*[.D8]" office:value-type="float" office:value="1.45" calcext:value-type="float">
            <text:p>1,45</text:p>
          </table:table-cell>
          <table:table-cell office:value-type="string" calcext:value-type="string">
            <text:p><text:a xlink:href="https://www.tme.eu/pl/details/tact4101-113160-a/mikroprzelaczniki-tact/connfly/ds1041-01-113kka16010/" xlink:type="simple">https://www.tme.eu/pl/details/tact4101-113160-a/mikroprzelaczniki-tact/connfly/ds1041-01-113kka16010/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G18035A</text:p>
          </table:table-cell>
          <table:table-cell office:value-type="float" office:value="3.7171" calcext:value-type="float">
            <text:p>3,7171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3.7171" calcext:value-type="float">
            <text:p>3,7171</text:p>
          </table:table-cell>
          <table:table-cell office:value-type="string" calcext:value-type="string">
            <text:p>https://www.tme.eu/pl/en/details/pc-g2.1/dc-power-connectors/changzhou-dahua-imp-and-exp-group-co/vg18035a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ondensator ceramiczny 100nF</text:p>
          </table:table-cell>
          <table:table-cell office:value-type="float" office:value="0.27" calcext:value-type="float">
            <text:p>0,27</text:p>
          </table:table-cell>
          <table:table-cell office:value-type="float" office:value="7" calcext:value-type="float">
            <text:p>7</text:p>
          </table:table-cell>
          <table:table-cell table:formula="of:=[.C10]*[.D10]" office:value-type="float" office:value="1.89" calcext:value-type="float">
            <text:p>1,89</text:p>
          </table:table-cell>
          <table:table-cell office:value-type="string" calcext:value-type="string">
            <text:p>https://www.tme.eu/pl/details/0603b104j500ct/kondensatory-mlcc-smd/walsin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zystor 1k<text:span text:style-name="T1">Ω</text:span>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0.05" calcext:value-type="float">
            <text:p>0,05</text:p>
          </table:table-cell>
          <table:table-cell office:value-type="string" calcext:value-type="string">
            <text:p>https://www.tme.eu/pl/details/erj3geyj102v/rezystory-smd/panasonic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2">Potencjometr 5k</text:span><text:span text:style-name="T3">Ω</text:span></text:p>
          </table:table-cell>
          <table:table-cell office:value-type="float" office:value="0.385" calcext:value-type="float">
            <text:p>0,385</text:p>
          </table:table-cell>
          <table:table-cell office:value-type="float" office:value="10" calcext:value-type="float">
            <text:p>10</text:p>
          </table:table-cell>
          <table:table-cell table:formula="of:=[.C12]*[.D12]" office:value-type="float" office:value="3.85" calcext:value-type="float">
            <text:p>3,85</text:p>
          </table:table-cell>
          <table:table-cell office:value-type="string" calcext:value-type="string">
            <text:p>https://www.tme.eu/pl/details/rkt6v-5k/potencjometry-tht-jednoobrotowe/sr-passives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rminal 2-pin</text:p>
          </table:table-cell>
          <table:table-cell office:value-type="float" office:value="1.67" calcext:value-type="float">
            <text:p>1,67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1.67" calcext:value-type="float">
            <text:p>1,67</text:p>
          </table:table-cell>
          <table:table-cell office:value-type="string" calcext:value-type="string">
            <text:p><text:a xlink:href="https://www.tme.eu/pl/en/details/tad05-02-1-l-g/pcb-terminal-blocks/gct/" xlink:type="simple">https://www.tme.eu/pl/en/details/tad05-02-1-l-g/pcb-terminal-blocks/gct/</text:a></text:p>
          </table:table-cell>
        </table:table-row>
        <table:table-row table:style-name="ro1">
          <table:table-cell table:number-columns-repeated="4"/>
          <table:table-cell table:formula="of:=SUM([.E2:.E12])" office:value-type="float" office:value="37.2847" calcext:value-type="float">
            <text:p>37,28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.00.0000</text:date>, <text:time style:data-style-name="N2" text:time-value="02:05:28.7797967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1T00:24:11.942617200</meta:creation-date>
    <dc:date>2026-04-11T02:06:34.488317000</dc:date>
    <meta:editing-duration>PT5H7M28S</meta:editing-duration>
    <meta:editing-cycles>6</meta:editing-cycles>
    <meta:generator>LibreOffice/25.8.5.2$Windows_X86_64 LibreOffice_project/9c8b85f387cc00a89945a79c9e6239f32e450ac2</meta:generator>
    <meta:document-statistic meta:table-count="1" meta:cell-count="79" meta:object-count="0"/>
  </office:meta>
</office:document-meta>
</file>